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800000157E3E24C6AE2567C41.png" manifest:media-type="image/png"/>
  <manifest:file-entry manifest:full-path="Pictures/100002010000031800000154A66D59E0D567BDB1.png" manifest:media-type="image/png"/>
  <manifest:file-entry manifest:full-path="Pictures/1000000000000020000000204B249CA79A42C6D7.png" manifest:media-type="image/png"/>
  <manifest:file-entry manifest:full-path="Pictures/100002010000031800000151DC360A092FBB86B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irline Analytics </text:p>
          </draw:text-box>
        </draw:frame>
        <draw:frame presentation:style-name="pr2" draw:text-style-name="P2" draw:layer="layout" svg:width="10.386cm" svg:height="1.479cm" svg:x="17.059cm" svg:y="18.008cm" presentation:class="subtitle" presentation:user-transformed="true">
          <draw:text-box>
            <text:p text:style-name="P1"><text:span text:style-name="T1">Nagesh Ramamoorth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ic Idea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2"/></text:p>
              </text:list-item>
              <text:list-item>
                <text:p text:style-name="P4"><text:span text:style-name="T2">Regardless of data size, our Airline Analytics should provide insights </text:span><text:span text:style-name="T2">quickly from data analysis.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Analytics users who are tired and having to go through multiple </text:span><text:span text:style-name="T2">dashboards(Tableau, QlikView) will get insights which are in form of </text:span><text:span text:style-name="T2">text and can be easily understandable.</text:span></text:p>
              </text:list-item>
              <text:list-item>
                <text:p text:style-name="P4"><text:span text:style-name="T2">Insights will be presented in terms of a storyboard.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Storyboards provide users with wide variety of benefits which include </text:span><text:span text:style-name="T2">contextual, actionable and consumable insigh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ights Moqup - 1</text:p>
          </draw:text-box>
        </draw:frame>
        <draw:frame draw:style-name="gr2" draw:text-style-name="P6" draw:layer="layout" svg:width="23.114cm" svg:height="10.697cm" svg:x="2.831cm" svg:y="5.375cm">
          <draw:image xlink:href="Pictures/100002010000031800000151DC360A092FBB8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ights Moqup - 2</text:p>
          </draw:text-box>
        </draw:frame>
        <draw:frame draw:style-name="gr2" draw:text-style-name="P6" draw:layer="layout" svg:width="23.418cm" svg:height="11.136cm" svg:x="2.133cm" svg:y="5.568cm">
          <draw:image xlink:href="Pictures/100002010000031800000154A66D59E0D567BD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ights Moqup - 3</text:p>
          </draw:text-box>
        </draw:frame>
        <draw:frame draw:style-name="gr2" draw:text-style-name="P6" draw:layer="layout" svg:width="24.287cm" svg:height="10.662cm" svg:x="1.895cm" svg:y="6.121cm">
          <draw:image xlink:href="Pictures/100002010000031800000157E3E24C6AE2567C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 Are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</text:p>
              </text:list-item>
            </text:list>
            <text:list text:style-name="L4">
              <text:list-item>
                <text:p><text:span text:style-name="T1"><text:s/></text:span><text:span text:style-name="T1">Customer Sales</text:span></text:p>
                <text:p><text:span text:style-name="T1"/></text:p>
              </text:list-item>
              <text:list-item>
                <text:p><text:span text:style-name="T1"><text:s/></text:span><text:span text:style-name="T1">Improved Marketing Efforts</text:span></text:p>
                <text:p><text:span text:style-name="T1"/></text:p>
              </text:list-item>
              <text:list-item>
                <text:p><text:span text:style-name="T1"><text:s/></text:span><text:span text:style-name="T1">Internal Use – Safety, Fuel efficienc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ach</text:p>
          </draw:text-box>
        </draw:frame>
        <draw:frame presentation:style-name="pr8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1"><text:span text:style-name="T1"><text:s/></text:span><text:span text:style-name="T1">Data Engineering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Data Analysis - Machine Learning Approaches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GUI - Presenting Storyboards of insights <text:s text:c="4"/></text:span><text:span text:style-name="T1"><text:tab/></text:span><text:span text:style-name="T1">obtained from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3.731cm" svg:x="1.158cm" svg:y="9.557cm" presentation:class="outline" presentation:user-transformed="true">
          <draw:text-box draw:corner-radius="19.061cm">
            <text:list text:style-name="L3">
              <text:list-item>
                <text:p><text:s text:c="29"/>Thank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03:14:01.009409014</meta:creation-date>
    <meta:editing-duration>PT7M37S</meta:editing-duration>
    <meta:editing-cycles>2</meta:editing-cycles>
    <meta:generator>LibreOffice/5.4.6.2$Linux_X86_64 LibreOffice_project/40m0$Build-2</meta:generator>
    <dc:date>2019-02-27T03:31:48.165832654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